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IBM Plex Sans"/>
    </style:style>
    <style:style style:name="P2" style:family="paragraph" style:parent-style-name="Standard">
      <style:text-properties style:font-name="IBM Plex Sans" officeooo:rsid="0010a5c7" officeooo:paragraph-rsid="0010a5c7"/>
    </style:style>
    <style:style style:name="P3" style:family="paragraph" style:parent-style-name="Standard">
      <style:text-properties style:font-name="IBM Plex Sans" officeooo:rsid="0013fc98" officeooo:paragraph-rsid="0013fc98"/>
    </style:style>
    <style:style style:name="P4" style:family="paragraph" style:parent-style-name="Standard">
      <style:text-properties style:font-name="IBM Plex Sans" officeooo:rsid="0010a5c7" officeooo:paragraph-rsid="0013fc98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098in" svg:width="1.75in" svg:height="0.6701in" draw:z-index="0">
        <draw:text-box>
          <text:p text:style-name="P2">Ilona</text:p>
          <text:p text:style-name="P3">custom order</text:p>
          <text:p text:style-name="P3">$11.50</text:p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ext:p text:style-name="Standard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ext:p text:style-name="Standard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ext:p text:style-name="Standard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ext:p text:style-name="P4">Ilona</text:p>
          <text:p text:style-name="P3">custom order</text:p>
          <text:p text:style-name="P3">$11.50</text:p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ext:p text:style-name="Standard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ext:p text:style-name="Standard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ext:p text:style-name="Standard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ext:p text:style-name="P4">Ilona</text:p>
          <text:p text:style-name="P3">custom order</text:p>
          <text:p text:style-name="P3">$11.00</text:p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ext:p text:style-name="Standard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ext:p text:style-name="Standard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ext:p text:style-name="Standard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ext:p text:style-name="P4">Ilona</text:p>
          <text:p text:style-name="P3">custom order</text:p>
          <text:p text:style-name="P3">$11.00</text:p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ext:p text:style-name="Standard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ext:p text:style-name="Standard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ext:p text:style-name="Standard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ext:p text:style-name="Standard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ext:p text:style-name="Standard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ext:p text:style-name="Standard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ext:p text:style-name="Standard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ext:p text:style-name="Standard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ext:p text:style-name="Standard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ext:p text:style-name="Standard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ext:p text:style-name="Standard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ext:p text:style-name="Standard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ext:p text:style-name="Standard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ext:p text:style-name="Standard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ext:p text:style-name="Standard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ext:p text:style-name="Standard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ext:p text:style-name="Standard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ext:p text:style-name="Standard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ext:p text:style-name="Standard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ext:p text:style-name="Standard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ext:p text:style-name="Standard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ext:p text:style-name="Standard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ext:p text:style-name="Standard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ext:p text:style-name="Standard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ext:p text:style-name="Standard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ext:p text:style-name="Standard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ext:p text:style-name="Standard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ext:p text:style-name="Standard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ext:p text:style-name="Standard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ext:p text:style-name="Standard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ext:p text:style-name="Standard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ext:p text:style-name="Standard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ext:p text:style-name="Standard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ext:p text:style-name="Standard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ext:p text:style-name="Standard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ext:p text:style-name="Standard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ext:p text:style-name="Standard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ext:p text:style-name="Standard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ext:p text:style-name="Standard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ext:p text:style-name="Standard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ext:p text:style-name="Standard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ext:p text:style-name="Standard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ext:p text:style-name="Standard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ext:p text:style-name="Standard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ext:p text:style-name="Standard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ext:p text:style-name="Standard"/>
        </draw:text-box>
      </draw:frame>
      <draw:frame draw:style-name="fr1" draw:name="Frame60" text:anchor-type="page" text:anchor-page-number="1" svg:x="6.489in" svg:y="9.8917in" svg:width="1.75in" svg:height="0.6701in" draw:z-index="59">
        <draw:text-box>
          <text:p text:style-name="Standard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02T09:49:25.983359200</dc:date>
    <meta:editing-duration>PT7M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2" meta:word-count="16" meta:character-count="92" meta:non-whitespace-character-count="88"/>
  </office:meta>
</office:document-meta>
</file>