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5in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4986in"/>
    </style:style>
    <style:style style:name="Table1.A1" style:family="table-cell">
      <style:table-cell-properties style:vertical-align="middl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4986in" fo:keep-together="always"/>
    </style:style>
    <style:style style:name="Table21.A1" style:family="table-cell">
      <style:table-cell-properties style:vertical-align="middl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4986in" fo:keep-together="always"/>
    </style:style>
    <style:style style:name="Table41.A1" style:family="table-cell">
      <style:table-cell-properties style:vertical-align="middle" style:writing-mode="page"/>
    </style:style>
    <style:style style:name="Table80" style:family="table">
      <style:table-properties style:width="1.75in" table:align="margins" style:may-break-between-rows="false"/>
    </style:style>
    <style:style style:name="Table80.A" style:family="table-column">
      <style:table-column-properties style:column-width="1.75in" style:rel-column-width="65535*"/>
    </style:style>
    <style:style style:name="Table80.1" style:family="table-row">
      <style:table-row-properties style:min-row-height="0.4986in" fo:keep-together="always"/>
    </style:style>
    <style:style style:name="Table80.A1" style:family="table-cell">
      <style:table-cell-properties style:vertical-align="middl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4986in" fo:keep-together="always"/>
    </style:style>
    <style:style style:name="Table2.A1" style:family="table-cell">
      <style:table-cell-properties style:vertical-align="middl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4986in" fo:keep-together="always"/>
    </style:style>
    <style:style style:name="Table22.A1" style:family="table-cell">
      <style:table-cell-properties style:vertical-align="middl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4986in" fo:keep-together="always"/>
    </style:style>
    <style:style style:name="Table42.A1" style:family="table-cell">
      <style:table-cell-properties style:vertical-align="middle" style:writing-mode="page"/>
    </style:style>
    <style:style style:name="Table79" style:family="table">
      <style:table-properties style:width="1.75in" table:align="margins" style:may-break-between-rows="false"/>
    </style:style>
    <style:style style:name="Table79.A" style:family="table-column">
      <style:table-column-properties style:column-width="1.75in" style:rel-column-width="65535*"/>
    </style:style>
    <style:style style:name="Table79.1" style:family="table-row">
      <style:table-row-properties style:min-row-height="0.4986in" fo:keep-together="always"/>
    </style:style>
    <style:style style:name="Table79.A1" style:family="table-cell">
      <style:table-cell-properties style:vertical-align="middl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4986in" fo:keep-together="always"/>
    </style:style>
    <style:style style:name="Table3.A1" style:family="table-cell">
      <style:table-cell-properties style:vertical-align="middl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4986in" fo:keep-together="always"/>
    </style:style>
    <style:style style:name="Table23.A1" style:family="table-cell">
      <style:table-cell-properties style:vertical-align="middl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4986in" fo:keep-together="always"/>
    </style:style>
    <style:style style:name="Table43.A1" style:family="table-cell">
      <style:table-cell-properties style:vertical-align="middle" style:writing-mode="page"/>
    </style:style>
    <style:style style:name="Table78" style:family="table">
      <style:table-properties style:width="1.75in" table:align="margins" style:may-break-between-rows="false"/>
    </style:style>
    <style:style style:name="Table78.A" style:family="table-column">
      <style:table-column-properties style:column-width="1.75in" style:rel-column-width="65535*"/>
    </style:style>
    <style:style style:name="Table78.1" style:family="table-row">
      <style:table-row-properties style:min-row-height="0.4986in" fo:keep-together="always"/>
    </style:style>
    <style:style style:name="Table78.A1" style:family="table-cell">
      <style:table-cell-properties style:vertical-align="middl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4986in" fo:keep-together="always"/>
    </style:style>
    <style:style style:name="Table4.A1" style:family="table-cell">
      <style:table-cell-properties style:vertical-align="middl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4986in" fo:keep-together="always"/>
    </style:style>
    <style:style style:name="Table24.A1" style:family="table-cell">
      <style:table-cell-properties style:vertical-align="middl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4986in" fo:keep-together="always"/>
    </style:style>
    <style:style style:name="Table44.A1" style:family="table-cell">
      <style:table-cell-properties style:vertical-align="middle" style:writing-mode="page"/>
    </style:style>
    <style:style style:name="Table77" style:family="table">
      <style:table-properties style:width="1.75in" table:align="margins" style:may-break-between-rows="false"/>
    </style:style>
    <style:style style:name="Table77.A" style:family="table-column">
      <style:table-column-properties style:column-width="1.75in" style:rel-column-width="65535*"/>
    </style:style>
    <style:style style:name="Table77.1" style:family="table-row">
      <style:table-row-properties style:min-row-height="0.4986in" fo:keep-together="always"/>
    </style:style>
    <style:style style:name="Table77.A1" style:family="table-cell">
      <style:table-cell-properties style:vertical-align="middl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4986in" fo:keep-together="always"/>
    </style:style>
    <style:style style:name="Table5.A1" style:family="table-cell">
      <style:table-cell-properties style:vertical-align="middl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4986in" fo:keep-together="always"/>
    </style:style>
    <style:style style:name="Table25.A1" style:family="table-cell">
      <style:table-cell-properties style:vertical-align="middl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4986in" fo:keep-together="always"/>
    </style:style>
    <style:style style:name="Table45.A1" style:family="table-cell">
      <style:table-cell-properties style:vertical-align="middle" style:writing-mode="page"/>
    </style:style>
    <style:style style:name="Table76" style:family="table">
      <style:table-properties style:width="1.75in" table:align="margins" style:may-break-between-rows="false"/>
    </style:style>
    <style:style style:name="Table76.A" style:family="table-column">
      <style:table-column-properties style:column-width="1.75in" style:rel-column-width="65535*"/>
    </style:style>
    <style:style style:name="Table76.1" style:family="table-row">
      <style:table-row-properties style:min-row-height="0.4986in" fo:keep-together="always"/>
    </style:style>
    <style:style style:name="Table76.A1" style:family="table-cell">
      <style:table-cell-properties style:vertical-align="middl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4986in" fo:keep-together="always"/>
    </style:style>
    <style:style style:name="Table6.A1" style:family="table-cell">
      <style:table-cell-properties style:vertical-align="middl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4986in" fo:keep-together="always"/>
    </style:style>
    <style:style style:name="Table26.A1" style:family="table-cell">
      <style:table-cell-properties style:vertical-align="middl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4986in" fo:keep-together="always"/>
    </style:style>
    <style:style style:name="Table46.A1" style:family="table-cell">
      <style:table-cell-properties style:vertical-align="middle" style:writing-mode="page"/>
    </style:style>
    <style:style style:name="Table75" style:family="table">
      <style:table-properties style:width="1.75in" table:align="margins" style:may-break-between-rows="false"/>
    </style:style>
    <style:style style:name="Table75.A" style:family="table-column">
      <style:table-column-properties style:column-width="1.75in" style:rel-column-width="65535*"/>
    </style:style>
    <style:style style:name="Table75.1" style:family="table-row">
      <style:table-row-properties style:min-row-height="0.4986in" fo:keep-together="always"/>
    </style:style>
    <style:style style:name="Table75.A1" style:family="table-cell">
      <style:table-cell-properties style:vertical-align="middl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4986in" fo:keep-together="always"/>
    </style:style>
    <style:style style:name="Table7.A1" style:family="table-cell">
      <style:table-cell-properties style:vertical-align="middl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4986in" fo:keep-together="always"/>
    </style:style>
    <style:style style:name="Table27.A1" style:family="table-cell">
      <style:table-cell-properties style:vertical-align="middl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4986in" fo:keep-together="always"/>
    </style:style>
    <style:style style:name="Table47.A1" style:family="table-cell">
      <style:table-cell-properties style:vertical-align="middle" style:writing-mode="page"/>
    </style:style>
    <style:style style:name="Table74" style:family="table">
      <style:table-properties style:width="1.75in" table:align="margins" style:may-break-between-rows="false"/>
    </style:style>
    <style:style style:name="Table74.A" style:family="table-column">
      <style:table-column-properties style:column-width="1.75in" style:rel-column-width="65535*"/>
    </style:style>
    <style:style style:name="Table74.1" style:family="table-row">
      <style:table-row-properties style:min-row-height="0.4986in" fo:keep-together="always"/>
    </style:style>
    <style:style style:name="Table74.A1" style:family="table-cell">
      <style:table-cell-properties style:vertical-align="middl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4986in" fo:keep-together="always"/>
    </style:style>
    <style:style style:name="Table8.A1" style:family="table-cell">
      <style:table-cell-properties style:vertical-align="middl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4986in" fo:keep-together="always"/>
    </style:style>
    <style:style style:name="Table28.A1" style:family="table-cell">
      <style:table-cell-properties style:vertical-align="middl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4986in" fo:keep-together="always"/>
    </style:style>
    <style:style style:name="Table48.A1" style:family="table-cell">
      <style:table-cell-properties style:vertical-align="middle" style:writing-mode="page"/>
    </style:style>
    <style:style style:name="Table73" style:family="table">
      <style:table-properties style:width="1.75in" table:align="margins" style:may-break-between-rows="false"/>
    </style:style>
    <style:style style:name="Table73.A" style:family="table-column">
      <style:table-column-properties style:column-width="1.75in" style:rel-column-width="65535*"/>
    </style:style>
    <style:style style:name="Table73.1" style:family="table-row">
      <style:table-row-properties style:min-row-height="0.4986in" fo:keep-together="always"/>
    </style:style>
    <style:style style:name="Table73.A1" style:family="table-cell">
      <style:table-cell-properties style:vertical-align="middl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4986in" fo:keep-together="always"/>
    </style:style>
    <style:style style:name="Table9.A1" style:family="table-cell">
      <style:table-cell-properties style:vertical-align="middl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4986in" fo:keep-together="always"/>
    </style:style>
    <style:style style:name="Table29.A1" style:family="table-cell">
      <style:table-cell-properties style:vertical-align="middl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4986in" fo:keep-together="always"/>
    </style:style>
    <style:style style:name="Table49.A1" style:family="table-cell">
      <style:table-cell-properties style:vertical-align="middle" style:writing-mode="page"/>
    </style:style>
    <style:style style:name="Table72" style:family="table">
      <style:table-properties style:width="1.75in" table:align="margins" style:may-break-between-rows="false"/>
    </style:style>
    <style:style style:name="Table72.A" style:family="table-column">
      <style:table-column-properties style:column-width="1.75in" style:rel-column-width="65535*"/>
    </style:style>
    <style:style style:name="Table72.1" style:family="table-row">
      <style:table-row-properties style:min-row-height="0.4986in" fo:keep-together="always"/>
    </style:style>
    <style:style style:name="Table72.A1" style:family="table-cell">
      <style:table-cell-properties style:vertical-align="middl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4986in" fo:keep-together="always"/>
    </style:style>
    <style:style style:name="Table10.A1" style:family="table-cell">
      <style:table-cell-properties style:vertical-align="middl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4986in" fo:keep-together="always"/>
    </style:style>
    <style:style style:name="Table30.A1" style:family="table-cell">
      <style:table-cell-properties style:vertical-align="middl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4986in" fo:keep-together="always"/>
    </style:style>
    <style:style style:name="Table50.A1" style:family="table-cell">
      <style:table-cell-properties style:vertical-align="middle" style:writing-mode="page"/>
    </style:style>
    <style:style style:name="Table71" style:family="table">
      <style:table-properties style:width="1.75in" table:align="margins" style:may-break-between-rows="false"/>
    </style:style>
    <style:style style:name="Table71.A" style:family="table-column">
      <style:table-column-properties style:column-width="1.75in" style:rel-column-width="65535*"/>
    </style:style>
    <style:style style:name="Table71.1" style:family="table-row">
      <style:table-row-properties style:min-row-height="0.4986in" fo:keep-together="always"/>
    </style:style>
    <style:style style:name="Table71.A1" style:family="table-cell">
      <style:table-cell-properties style:vertical-align="middl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4986in" fo:keep-together="always"/>
    </style:style>
    <style:style style:name="Table11.A1" style:family="table-cell">
      <style:table-cell-properties style:vertical-align="middl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4986in" fo:keep-together="always"/>
    </style:style>
    <style:style style:name="Table31.A1" style:family="table-cell">
      <style:table-cell-properties style:vertical-align="middl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4986in" fo:keep-together="always"/>
    </style:style>
    <style:style style:name="Table51.A1" style:family="table-cell">
      <style:table-cell-properties style:vertical-align="middle" style:writing-mode="page"/>
    </style:style>
    <style:style style:name="Table70" style:family="table">
      <style:table-properties style:width="1.75in" table:align="margins" style:may-break-between-rows="false"/>
    </style:style>
    <style:style style:name="Table70.A" style:family="table-column">
      <style:table-column-properties style:column-width="1.75in" style:rel-column-width="65535*"/>
    </style:style>
    <style:style style:name="Table70.1" style:family="table-row">
      <style:table-row-properties style:min-row-height="0.4986in" fo:keep-together="always"/>
    </style:style>
    <style:style style:name="Table70.A1" style:family="table-cell">
      <style:table-cell-properties style:vertical-align="middl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4986in" fo:keep-together="always"/>
    </style:style>
    <style:style style:name="Table12.A1" style:family="table-cell">
      <style:table-cell-properties style:vertical-align="middl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4986in" fo:keep-together="always"/>
    </style:style>
    <style:style style:name="Table32.A1" style:family="table-cell">
      <style:table-cell-properties style:vertical-align="middl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4986in" fo:keep-together="always"/>
    </style:style>
    <style:style style:name="Table52.A1" style:family="table-cell">
      <style:table-cell-properties style:vertical-align="middle" style:writing-mode="page"/>
    </style:style>
    <style:style style:name="Table69" style:family="table">
      <style:table-properties style:width="1.75in" table:align="margins" style:may-break-between-rows="false"/>
    </style:style>
    <style:style style:name="Table69.A" style:family="table-column">
      <style:table-column-properties style:column-width="1.75in" style:rel-column-width="65535*"/>
    </style:style>
    <style:style style:name="Table69.1" style:family="table-row">
      <style:table-row-properties style:min-row-height="0.4986in" fo:keep-together="always"/>
    </style:style>
    <style:style style:name="Table69.A1" style:family="table-cell">
      <style:table-cell-properties style:vertical-align="middl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4986in" fo:keep-together="always"/>
    </style:style>
    <style:style style:name="Table13.A1" style:family="table-cell">
      <style:table-cell-properties style:vertical-align="middl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4986in" fo:keep-together="always"/>
    </style:style>
    <style:style style:name="Table33.A1" style:family="table-cell">
      <style:table-cell-properties style:vertical-align="middl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4986in" fo:keep-together="always"/>
    </style:style>
    <style:style style:name="Table53.A1" style:family="table-cell">
      <style:table-cell-properties style:vertical-align="middle" style:writing-mode="page"/>
    </style:style>
    <style:style style:name="Table68" style:family="table">
      <style:table-properties style:width="1.75in" table:align="margins" style:may-break-between-rows="false"/>
    </style:style>
    <style:style style:name="Table68.A" style:family="table-column">
      <style:table-column-properties style:column-width="1.75in" style:rel-column-width="65535*"/>
    </style:style>
    <style:style style:name="Table68.1" style:family="table-row">
      <style:table-row-properties style:min-row-height="0.4986in" fo:keep-together="always"/>
    </style:style>
    <style:style style:name="Table68.A1" style:family="table-cell">
      <style:table-cell-properties style:vertical-align="middl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4986in" fo:keep-together="always"/>
    </style:style>
    <style:style style:name="Table14.A1" style:family="table-cell">
      <style:table-cell-properties style:vertical-align="middl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4986in" fo:keep-together="always"/>
    </style:style>
    <style:style style:name="Table34.A1" style:family="table-cell">
      <style:table-cell-properties style:vertical-align="middle" style:writing-mode="page"/>
    </style:style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4986in" fo:keep-together="always"/>
    </style:style>
    <style:style style:name="Table54.A1" style:family="table-cell">
      <style:table-cell-properties style:vertical-align="middle" style:writing-mode="page"/>
    </style:style>
    <style:style style:name="Table67" style:family="table">
      <style:table-properties style:width="1.75in" table:align="margins" style:may-break-between-rows="false"/>
    </style:style>
    <style:style style:name="Table67.A" style:family="table-column">
      <style:table-column-properties style:column-width="1.75in" style:rel-column-width="65535*"/>
    </style:style>
    <style:style style:name="Table67.1" style:family="table-row">
      <style:table-row-properties style:min-row-height="0.4986in" fo:keep-together="always"/>
    </style:style>
    <style:style style:name="Table67.A1" style:family="table-cell">
      <style:table-cell-properties style:vertical-align="middl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4986in" fo:keep-together="always"/>
    </style:style>
    <style:style style:name="Table15.A1" style:family="table-cell">
      <style:table-cell-properties style:vertical-align="middl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4986in" fo:keep-together="always"/>
    </style:style>
    <style:style style:name="Table35.A1" style:family="table-cell">
      <style:table-cell-properties style:vertical-align="middl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4986in" fo:keep-together="always"/>
    </style:style>
    <style:style style:name="Table55.A1" style:family="table-cell">
      <style:table-cell-properties style:vertical-align="middle" style:writing-mode="page"/>
    </style:style>
    <style:style style:name="Table66" style:family="table">
      <style:table-properties style:width="1.75in" table:align="margins" style:may-break-between-rows="false"/>
    </style:style>
    <style:style style:name="Table66.A" style:family="table-column">
      <style:table-column-properties style:column-width="1.75in" style:rel-column-width="65535*"/>
    </style:style>
    <style:style style:name="Table66.1" style:family="table-row">
      <style:table-row-properties style:min-row-height="0.4986in" fo:keep-together="always"/>
    </style:style>
    <style:style style:name="Table66.A1" style:family="table-cell">
      <style:table-cell-properties style:vertical-align="middl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4986in" fo:keep-together="always"/>
    </style:style>
    <style:style style:name="Table16.A1" style:family="table-cell">
      <style:table-cell-properties style:vertical-align="middl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4986in" fo:keep-together="always"/>
    </style:style>
    <style:style style:name="Table36.A1" style:family="table-cell">
      <style:table-cell-properties style:vertical-align="middl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4986in" fo:keep-together="always"/>
    </style:style>
    <style:style style:name="Table56.A1" style:family="table-cell">
      <style:table-cell-properties style:vertical-align="middle" style:writing-mode="page"/>
    </style:style>
    <style:style style:name="Table65" style:family="table">
      <style:table-properties style:width="1.75in" table:align="margins" style:may-break-between-rows="false"/>
    </style:style>
    <style:style style:name="Table65.A" style:family="table-column">
      <style:table-column-properties style:column-width="1.75in" style:rel-column-width="65535*"/>
    </style:style>
    <style:style style:name="Table65.1" style:family="table-row">
      <style:table-row-properties style:min-row-height="0.4986in" fo:keep-together="always"/>
    </style:style>
    <style:style style:name="Table65.A1" style:family="table-cell">
      <style:table-cell-properties style:vertical-align="middl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4986in" fo:keep-together="always"/>
    </style:style>
    <style:style style:name="Table17.A1" style:family="table-cell">
      <style:table-cell-properties style:vertical-align="middl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4986in" fo:keep-together="always"/>
    </style:style>
    <style:style style:name="Table37.A1" style:family="table-cell">
      <style:table-cell-properties style:vertical-align="middl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4986in" fo:keep-together="always"/>
    </style:style>
    <style:style style:name="Table57.A1" style:family="table-cell">
      <style:table-cell-properties style:vertical-align="middle" style:writing-mode="page"/>
    </style:style>
    <style:style style:name="Table64" style:family="table">
      <style:table-properties style:width="1.75in" table:align="margins" style:may-break-between-rows="false"/>
    </style:style>
    <style:style style:name="Table64.A" style:family="table-column">
      <style:table-column-properties style:column-width="1.75in" style:rel-column-width="65535*"/>
    </style:style>
    <style:style style:name="Table64.1" style:family="table-row">
      <style:table-row-properties style:min-row-height="0.4986in" fo:keep-together="always"/>
    </style:style>
    <style:style style:name="Table64.A1" style:family="table-cell">
      <style:table-cell-properties style:vertical-align="middl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4986in" fo:keep-together="always"/>
    </style:style>
    <style:style style:name="Table18.A1" style:family="table-cell">
      <style:table-cell-properties style:vertical-align="middl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4986in" fo:keep-together="always"/>
    </style:style>
    <style:style style:name="Table38.A1" style:family="table-cell">
      <style:table-cell-properties style:vertical-align="middl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4986in" fo:keep-together="always"/>
    </style:style>
    <style:style style:name="Table58.A1" style:family="table-cell">
      <style:table-cell-properties style:vertical-align="middle" style:writing-mode="page"/>
    </style:style>
    <style:style style:name="Table63" style:family="table">
      <style:table-properties style:width="1.75in" table:align="margins" style:may-break-between-rows="false"/>
    </style:style>
    <style:style style:name="Table63.A" style:family="table-column">
      <style:table-column-properties style:column-width="1.75in" style:rel-column-width="65535*"/>
    </style:style>
    <style:style style:name="Table63.1" style:family="table-row">
      <style:table-row-properties style:min-row-height="0.4986in" fo:keep-together="always"/>
    </style:style>
    <style:style style:name="Table63.A1" style:family="table-cell">
      <style:table-cell-properties style:vertical-align="middl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4986in" fo:keep-together="always"/>
    </style:style>
    <style:style style:name="Table19.A1" style:family="table-cell">
      <style:table-cell-properties style:vertical-align="middl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4986in" fo:keep-together="always"/>
    </style:style>
    <style:style style:name="Table39.A1" style:family="table-cell">
      <style:table-cell-properties style:vertical-align="middl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4986in" fo:keep-together="always"/>
    </style:style>
    <style:style style:name="Table59.A1" style:family="table-cell">
      <style:table-cell-properties style:vertical-align="middle" style:writing-mode="page"/>
    </style:style>
    <style:style style:name="Table62" style:family="table">
      <style:table-properties style:width="1.75in" table:align="margins" style:may-break-between-rows="false"/>
    </style:style>
    <style:style style:name="Table62.A" style:family="table-column">
      <style:table-column-properties style:column-width="1.75in" style:rel-column-width="65535*"/>
    </style:style>
    <style:style style:name="Table62.1" style:family="table-row">
      <style:table-row-properties style:min-row-height="0.4986in" fo:keep-together="always"/>
    </style:style>
    <style:style style:name="Table62.A1" style:family="table-cell">
      <style:table-cell-properties style:vertical-align="middl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4986in" fo:keep-together="always"/>
    </style:style>
    <style:style style:name="Table20.A1" style:family="table-cell">
      <style:table-cell-properties style:vertical-align="middl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4986in" fo:keep-together="always"/>
    </style:style>
    <style:style style:name="Table40.A1" style:family="table-cell">
      <style:table-cell-properties style:vertical-align="middl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4986in" fo:keep-together="always"/>
    </style:style>
    <style:style style:name="Table60.A1" style:family="table-cell">
      <style:table-cell-properties style:vertical-align="middle" style:writing-mode="page"/>
    </style:style>
    <style:style style:name="Table61" style:family="table">
      <style:table-properties style:width="1.75in" table:align="margins" style:may-break-between-rows="false"/>
    </style:style>
    <style:style style:name="Table61.A" style:family="table-column">
      <style:table-column-properties style:column-width="1.75in" style:rel-column-width="65535*"/>
    </style:style>
    <style:style style:name="Table61.1" style:family="table-row">
      <style:table-row-properties style:min-row-height="0.4986in" fo:keep-together="always"/>
    </style:style>
    <style:style style:name="Table61.A1" style:family="table-cell">
      <style:table-cell-properties style:vertical-align="middl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officeooo:paragraph-rsid="0002e62c"/>
    </style:style>
    <style:style style:name="P3" style:family="paragraph" style:parent-style-name="Standard">
      <style:text-properties officeooo:paragraph-rsid="0002e62c"/>
    </style:style>
    <style:style style:name="P4" style:family="paragraph" style:parent-style-name="Table_20_Contents">
      <style:paragraph-properties fo:text-align="center" style:justify-single-word="false"/>
      <style:text-properties officeooo:paragraph-rsid="000c6b8a"/>
    </style:style>
    <style:style style:name="P5" style:family="paragraph" style:parent-style-name="Standard">
      <style:text-properties officeooo:paragraph-rsid="0004cab3"/>
    </style:style>
    <style:style style:name="P6" style:family="paragraph" style:parent-style-name="Table_20_Contents">
      <style:paragraph-properties fo:text-align="center" style:justify-single-word="false"/>
      <style:text-properties officeooo:paragraph-rsid="00061419"/>
    </style:style>
    <style:style style:name="P7" style:family="paragraph" style:parent-style-name="Standard">
      <style:text-properties officeooo:paragraph-rsid="00061419"/>
    </style:style>
    <style:style style:name="P8" style:family="paragraph" style:parent-style-name="Table_20_Contents">
      <style:paragraph-properties fo:text-align="center" style:justify-single-word="false"/>
      <style:text-properties fo:font-size="14pt" officeooo:paragraph-rsid="0002e62c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officeooo:rsid="000c6b8a" officeooo:paragraph-rsid="000c6b8a"/>
    </style:style>
    <style:style style:name="P10" style:family="paragraph" style:parent-style-name="Table_20_Contents">
      <style:paragraph-properties fo:text-align="center" style:justify-single-word="false"/>
      <style:text-properties officeooo:rsid="000d4118" officeooo:paragraph-rsid="000d4118"/>
    </style:style>
    <style:style style:name="P11" style:family="paragraph" style:parent-style-name="Table_20_Contents">
      <style:paragraph-properties fo:text-align="center" style:justify-single-word="false"/>
      <style:text-properties officeooo:paragraph-rsid="0004cab3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098in" svg:y="0.5in" svg:width="1.75in" svg:height="0.5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"/>
              </table:table-cell>
            </table:table-row>
          </table:table>
          <text:p text:style-name="Standard"/>
        </draw:text-box>
      </draw:frame>
      <draw:frame draw:style-name="fr1" draw:name="Frame2" text:anchor-type="page" text:anchor-page-number="1" svg:x="2.3693in" svg:y="0.5in" svg:width="1.75in" svg:height="0.5in" draw:z-index="1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" text:anchor-type="page" text:anchor-page-number="1" svg:x="4.4291in" svg:y="0.5in" svg:width="1.75in" svg:height="0.5in" draw:z-index="2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" text:anchor-type="page" text:anchor-page-number="1" svg:x="6.489in" svg:y="0.5in" svg:width="1.75in" svg:height="0.5in" draw:z-index="3">
        <draw:text-box>
          <table:table table:name="Table80" table:style-name="Table80">
            <table:table-column table:style-name="Table80.A"/>
            <table:table-row table:style-name="Table80.1">
              <table:table-cell table:style-name="Table8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" text:anchor-type="page" text:anchor-page-number="1" svg:x="0.3098in" svg:y="1in" svg:width="1.75in" svg:height="0.5in" draw:z-index="4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8"/>
              </table:table-cell>
            </table:table-row>
          </table:table>
          <text:p text:style-name="P3"/>
        </draw:text-box>
      </draw:frame>
      <draw:frame draw:style-name="fr1" draw:name="Frame6" text:anchor-type="page" text:anchor-page-number="1" svg:x="2.3693in" svg:y="1in" svg:width="1.75in" svg:height="0.5in" draw:z-index="5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" text:anchor-type="page" text:anchor-page-number="1" svg:x="4.4291in" svg:y="1in" svg:width="1.75in" svg:height="0.5in" draw:z-index="6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8" text:anchor-type="page" text:anchor-page-number="1" svg:x="6.489in" svg:y="1in" svg:width="1.75in" svg:height="0.5in" draw:z-index="7">
        <draw:text-box>
          <table:table table:name="Table79" table:style-name="Table79">
            <table:table-column table:style-name="Table79.A"/>
            <table:table-row table:style-name="Table79.1">
              <table:table-cell table:style-name="Table7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9" text:anchor-type="page" text:anchor-page-number="1" svg:x="0.3098in" svg:y="1.5in" svg:width="1.75in" svg:height="0.5in" draw:z-index="8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2"/>
              </table:table-cell>
            </table:table-row>
          </table:table>
          <text:p text:style-name="P3">Caroline Throop</text:p>
        </draw:text-box>
      </draw:frame>
      <draw:frame draw:style-name="fr1" draw:name="Frame10" text:anchor-type="page" text:anchor-page-number="1" svg:x="2.3693in" svg:y="1.5in" svg:width="1.75in" svg:height="0.5in" draw:z-index="9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1" text:anchor-type="page" text:anchor-page-number="1" svg:x="4.4291in" svg:y="1.5in" svg:width="1.75in" svg:height="0.5in" draw:z-index="10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12" text:anchor-type="page" text:anchor-page-number="1" svg:x="6.489in" svg:y="1.5in" svg:width="1.75in" svg:height="0.5in" draw:z-index="11">
        <draw:text-box>
          <table:table table:name="Table78" table:style-name="Table78">
            <table:table-column table:style-name="Table78.A"/>
            <table:table-row table:style-name="Table78.1">
              <table:table-cell table:style-name="Table7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13" text:anchor-type="page" text:anchor-page-number="1" svg:x="0.3098in" svg:y="2in" svg:width="1.75in" svg:height="0.5in" draw:z-index="12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4" text:anchor-type="page" text:anchor-page-number="1" svg:x="2.3693in" svg:y="2in" svg:width="1.75in" svg:height="0.5in" draw:z-index="13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5" text:anchor-type="page" text:anchor-page-number="1" svg:x="4.4291in" svg:y="2in" svg:width="1.75in" svg:height="0.5in" draw:z-index="14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16" text:anchor-type="page" text:anchor-page-number="1" svg:x="6.489in" svg:y="2in" svg:width="1.75in" svg:height="0.5in" draw:z-index="15">
        <draw:text-box>
          <table:table table:name="Table77" table:style-name="Table77">
            <table:table-column table:style-name="Table77.A"/>
            <table:table-row table:style-name="Table77.1">
              <table:table-cell table:style-name="Table7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17" text:anchor-type="page" text:anchor-page-number="1" svg:x="0.3098in" svg:y="2.5in" svg:width="1.75in" svg:height="0.5in" draw:z-index="16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8" text:anchor-type="page" text:anchor-page-number="1" svg:x="2.3693in" svg:y="2.5in" svg:width="1.75in" svg:height="0.5in" draw:z-index="1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19" text:anchor-type="page" text:anchor-page-number="1" svg:x="4.4291in" svg:y="2.5in" svg:width="1.75in" svg:height="0.5in" draw:z-index="18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0" text:anchor-type="page" text:anchor-page-number="1" svg:x="6.489in" svg:y="2.5in" svg:width="1.75in" svg:height="0.5in" draw:z-index="19">
        <draw:text-box>
          <table:table table:name="Table76" table:style-name="Table76">
            <table:table-column table:style-name="Table76.A"/>
            <table:table-row table:style-name="Table76.1">
              <table:table-cell table:style-name="Table76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1" text:anchor-type="page" text:anchor-page-number="1" svg:x="0.3098in" svg:y="3in" svg:width="1.75in" svg:height="0.5in" draw:z-index="20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2" text:anchor-type="page" text:anchor-page-number="1" svg:x="2.3693in" svg:y="3in" svg:width="1.75in" svg:height="0.5in" draw:z-index="21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2">Anne Baxter</text:p>
              </table:table-cell>
            </table:table-row>
          </table:table>
          <text:p text:style-name="P3"/>
        </draw:text-box>
      </draw:frame>
      <draw:frame draw:style-name="fr1" draw:name="Frame23" text:anchor-type="page" text:anchor-page-number="1" svg:x="4.4291in" svg:y="3in" svg:width="1.75in" svg:height="0.5in" draw:z-index="22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4" text:anchor-type="page" text:anchor-page-number="1" svg:x="6.489in" svg:y="3in" svg:width="1.75in" svg:height="0.5in" draw:z-index="23">
        <draw:text-box>
          <table:table table:name="Table75" table:style-name="Table75">
            <table:table-column table:style-name="Table75.A"/>
            <table:table-row table:style-name="Table75.1">
              <table:table-cell table:style-name="Table75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5" text:anchor-type="page" text:anchor-page-number="1" svg:x="0.3098in" svg:y="3.5in" svg:width="1.75in" svg:height="0.5in" draw:z-index="24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6" text:anchor-type="page" text:anchor-page-number="1" svg:x="2.3693in" svg:y="3.5in" svg:width="1.75in" svg:height="0.5in" draw:z-index="25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2">Courtney Fullarton</text:p>
              </table:table-cell>
            </table:table-row>
          </table:table>
          <text:p text:style-name="P3"/>
        </draw:text-box>
      </draw:frame>
      <draw:frame draw:style-name="fr1" draw:name="Frame27" text:anchor-type="page" text:anchor-page-number="1" svg:x="4.4291in" svg:y="3.5in" svg:width="1.75in" svg:height="0.5in" draw:z-index="26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8" text:anchor-type="page" text:anchor-page-number="1" svg:x="6.489in" svg:y="3.5in" svg:width="1.75in" svg:height="0.5in" draw:z-index="27">
        <draw:text-box>
          <table:table table:name="Table74" table:style-name="Table74">
            <table:table-column table:style-name="Table74.A"/>
            <table:table-row table:style-name="Table74.1">
              <table:table-cell table:style-name="Table74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9" text:anchor-type="page" text:anchor-page-number="1" svg:x="0.3098in" svg:y="4in" svg:width="1.75in" svg:height="0.5in" draw:z-index="28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0" text:anchor-type="page" text:anchor-page-number="1" svg:x="2.3693in" svg:y="4in" svg:width="1.75in" svg:height="0.5in" draw:z-index="29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1" text:anchor-type="page" text:anchor-page-number="1" svg:x="4.4291in" svg:y="4in" svg:width="1.75in" svg:height="0.5in" draw:z-index="30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32" text:anchor-type="page" text:anchor-page-number="1" svg:x="6.489in" svg:y="4in" svg:width="1.75in" svg:height="0.5in" draw:z-index="31">
        <draw:text-box>
          <table:table table:name="Table73" table:style-name="Table73">
            <table:table-column table:style-name="Table73.A"/>
            <table:table-row table:style-name="Table73.1">
              <table:table-cell table:style-name="Table73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33" text:anchor-type="page" text:anchor-page-number="1" svg:x="0.3098in" svg:y="4.5in" svg:width="1.75in" svg:height="0.5in" draw:z-index="32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4" text:anchor-type="page" text:anchor-page-number="1" svg:x="2.3693in" svg:y="4.5in" svg:width="1.75in" svg:height="0.5in" draw:z-index="33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5" text:anchor-type="page" text:anchor-page-number="1" svg:x="4.4291in" svg:y="4.5in" svg:width="1.75in" svg:height="0.5in" draw:z-index="34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36" text:anchor-type="page" text:anchor-page-number="1" svg:x="6.489in" svg:y="4.5in" svg:width="1.75in" svg:height="0.5in" draw:z-index="35">
        <draw:text-box>
          <table:table table:name="Table72" table:style-name="Table72">
            <table:table-column table:style-name="Table72.A"/>
            <table:table-row table:style-name="Table72.1">
              <table:table-cell table:style-name="Table72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37" text:anchor-type="page" text:anchor-page-number="1" svg:x="0.3098in" svg:y="5in" svg:width="1.75in" svg:height="0.5in" draw:z-index="36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8" text:anchor-type="page" text:anchor-page-number="1" svg:x="2.3693in" svg:y="5in" svg:width="1.75in" svg:height="0.5in" draw:z-index="3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9" text:anchor-type="page" text:anchor-page-number="1" svg:x="4.4291in" svg:y="5in" svg:width="1.75in" svg:height="0.5in" draw:z-index="38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0" text:anchor-type="page" text:anchor-page-number="1" svg:x="6.489in" svg:y="5in" svg:width="1.75in" svg:height="0.5in" draw:z-index="39">
        <draw:text-box>
          <table:table table:name="Table71" table:style-name="Table71">
            <table:table-column table:style-name="Table71.A"/>
            <table:table-row table:style-name="Table71.1">
              <table:table-cell table:style-name="Table71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1" text:anchor-type="page" text:anchor-page-number="1" svg:x="0.3098in" svg:y="5.5in" svg:width="1.75in" svg:height="0.5in" draw:z-index="40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2" text:anchor-type="page" text:anchor-page-number="1" svg:x="2.3693in" svg:y="5.5in" svg:width="1.75in" svg:height="0.5in" draw:z-index="41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3" text:anchor-type="page" text:anchor-page-number="1" svg:x="4.4291in" svg:y="5.5in" svg:width="1.75in" svg:height="0.5in" draw:z-index="42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4" text:anchor-type="page" text:anchor-page-number="1" svg:x="6.489in" svg:y="5.5in" svg:width="1.75in" svg:height="0.5in" draw:z-index="43">
        <draw:text-box>
          <table:table table:name="Table70" table:style-name="Table70">
            <table:table-column table:style-name="Table70.A"/>
            <table:table-row table:style-name="Table70.1">
              <table:table-cell table:style-name="Table7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5" text:anchor-type="page" text:anchor-page-number="1" svg:x="0.3098in" svg:y="6in" svg:width="1.75in" svg:height="0.5in" draw:z-index="44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6" text:anchor-type="page" text:anchor-page-number="1" svg:x="2.3693in" svg:y="6in" svg:width="1.75in" svg:height="0.5in" draw:z-index="45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7" text:anchor-type="page" text:anchor-page-number="1" svg:x="4.4291in" svg:y="6in" svg:width="1.75in" svg:height="0.5in" draw:z-index="46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8" text:anchor-type="page" text:anchor-page-number="1" svg:x="6.489in" svg:y="6in" svg:width="1.75in" svg:height="0.5in" draw:z-index="47">
        <draw:text-box>
          <table:table table:name="Table69" table:style-name="Table69">
            <table:table-column table:style-name="Table69.A"/>
            <table:table-row table:style-name="Table69.1">
              <table:table-cell table:style-name="Table6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9" text:anchor-type="page" text:anchor-page-number="1" svg:x="0.3098in" svg:y="6.5in" svg:width="1.75in" svg:height="0.5in" draw:z-index="48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0" text:anchor-type="page" text:anchor-page-number="1" svg:x="2.3693in" svg:y="6.5in" svg:width="1.75in" svg:height="0.5in" draw:z-index="49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1" text:anchor-type="page" text:anchor-page-number="1" svg:x="4.4291in" svg:y="6.5in" svg:width="1.75in" svg:height="0.5in" draw:z-index="50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9"/>
              </table:table-cell>
            </table:table-row>
          </table:table>
          <text:p text:style-name="P5"/>
        </draw:text-box>
      </draw:frame>
      <draw:frame draw:style-name="fr1" draw:name="Frame52" text:anchor-type="page" text:anchor-page-number="1" svg:x="6.489in" svg:y="6.5in" svg:width="1.75in" svg:height="0.5in" draw:z-index="51">
        <draw:text-box>
          <table:table table:name="Table68" table:style-name="Table68">
            <table:table-column table:style-name="Table68.A"/>
            <table:table-row table:style-name="Table68.1">
              <table:table-cell table:style-name="Table6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3" text:anchor-type="page" text:anchor-page-number="1" svg:x="0.3098in" svg:y="7in" svg:width="1.75in" svg:height="0.5in" draw:z-index="52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4" text:anchor-type="page" text:anchor-page-number="1" svg:x="2.3693in" svg:y="7in" svg:width="1.75in" svg:height="0.5in" draw:z-index="53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5" text:anchor-type="page" text:anchor-page-number="1" svg:x="4.4291in" svg:y="7in" svg:width="1.75in" svg:height="0.5in" draw:z-index="54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10"/>
              </table:table-cell>
            </table:table-row>
          </table:table>
          <text:p text:style-name="P5"/>
        </draw:text-box>
      </draw:frame>
      <draw:frame draw:style-name="fr1" draw:name="Frame56" text:anchor-type="page" text:anchor-page-number="1" svg:x="6.489in" svg:y="7in" svg:width="1.75in" svg:height="0.5in" draw:z-index="55">
        <draw:text-box>
          <table:table table:name="Table67" table:style-name="Table67">
            <table:table-column table:style-name="Table67.A"/>
            <table:table-row table:style-name="Table67.1">
              <table:table-cell table:style-name="Table6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7" text:anchor-type="page" text:anchor-page-number="1" svg:x="0.3098in" svg:y="7.5in" svg:width="1.75in" svg:height="0.5in" draw:z-index="56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8" text:anchor-type="page" text:anchor-page-number="1" svg:x="2.3693in" svg:y="7.5in" svg:width="1.75in" svg:height="0.5in" draw:z-index="57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9" text:anchor-type="page" text:anchor-page-number="1" svg:x="4.4291in" svg:y="7.5in" svg:width="1.75in" svg:height="0.5in" draw:z-index="58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10"/>
              </table:table-cell>
            </table:table-row>
          </table:table>
          <text:p text:style-name="P5"/>
        </draw:text-box>
      </draw:frame>
      <draw:frame draw:style-name="fr1" draw:name="Frame60" text:anchor-type="page" text:anchor-page-number="1" svg:x="6.489in" svg:y="7.5in" svg:width="1.75in" svg:height="0.5in" draw:z-index="59">
        <draw:text-box>
          <table:table table:name="Table66" table:style-name="Table66">
            <table:table-column table:style-name="Table66.A"/>
            <table:table-row table:style-name="Table66.1">
              <table:table-cell table:style-name="Table66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1" text:anchor-type="page" text:anchor-page-number="1" svg:x="0.3098in" svg:y="8in" svg:width="1.75in" svg:height="0.5in" draw:z-index="60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62" text:anchor-type="page" text:anchor-page-number="1" svg:x="2.3693in" svg:y="8in" svg:width="1.75in" svg:height="0.5in" draw:z-index="61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63" text:anchor-type="page" text:anchor-page-number="1" svg:x="4.4291in" svg:y="8in" svg:width="1.75in" svg:height="0.5in" draw:z-index="62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10"/>
              </table:table-cell>
            </table:table-row>
          </table:table>
          <text:p text:style-name="P5"/>
        </draw:text-box>
      </draw:frame>
      <draw:frame draw:style-name="fr1" draw:name="Frame64" text:anchor-type="page" text:anchor-page-number="1" svg:x="6.489in" svg:y="8in" svg:width="1.75in" svg:height="0.5in" draw:z-index="63">
        <draw:text-box>
          <table:table table:name="Table65" table:style-name="Table65">
            <table:table-column table:style-name="Table65.A"/>
            <table:table-row table:style-name="Table65.1">
              <table:table-cell table:style-name="Table65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5" text:anchor-type="page" text:anchor-page-number="1" svg:x="0.3098in" svg:y="8.5in" svg:width="1.75in" svg:height="0.5in" draw:z-index="64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66" text:anchor-type="page" text:anchor-page-number="1" svg:x="2.3693in" svg:y="8.5in" svg:width="1.75in" svg:height="0.5in" draw:z-index="65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11"/>
              </table:table-cell>
            </table:table-row>
          </table:table>
          <text:p text:style-name="P5"/>
        </draw:text-box>
      </draw:frame>
      <draw:frame draw:style-name="fr1" draw:name="Frame67" text:anchor-type="page" text:anchor-page-number="1" svg:x="4.4291in" svg:y="8.5in" svg:width="1.75in" svg:height="0.5in" draw:z-index="66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10"/>
              </table:table-cell>
            </table:table-row>
          </table:table>
          <text:p text:style-name="P7"/>
        </draw:text-box>
      </draw:frame>
      <draw:frame draw:style-name="fr1" draw:name="Frame68" text:anchor-type="page" text:anchor-page-number="1" svg:x="6.489in" svg:y="8.5in" svg:width="1.75in" svg:height="0.5in" draw:z-index="67">
        <draw:text-box>
          <table:table table:name="Table64" table:style-name="Table64">
            <table:table-column table:style-name="Table64.A"/>
            <table:table-row table:style-name="Table64.1">
              <table:table-cell table:style-name="Table64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9" text:anchor-type="page" text:anchor-page-number="1" svg:x="0.3098in" svg:y="9in" svg:width="1.75in" svg:height="0.5in" draw:z-index="68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0" text:anchor-type="page" text:anchor-page-number="1" svg:x="2.3693in" svg:y="9in" svg:width="1.75in" svg:height="0.5in" draw:z-index="69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11"/>
              </table:table-cell>
            </table:table-row>
          </table:table>
          <text:p text:style-name="P5"/>
        </draw:text-box>
      </draw:frame>
      <draw:frame draw:style-name="fr1" draw:name="Frame71" text:anchor-type="page" text:anchor-page-number="1" svg:x="4.4291in" svg:y="9in" svg:width="1.75in" svg:height="0.5in" draw:z-index="70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10"/>
              </table:table-cell>
            </table:table-row>
          </table:table>
          <text:p text:style-name="P7"/>
        </draw:text-box>
      </draw:frame>
      <draw:frame draw:style-name="fr1" draw:name="Frame72" text:anchor-type="page" text:anchor-page-number="1" svg:x="6.489in" svg:y="9in" svg:width="1.75in" svg:height="0.5in" draw:z-index="71">
        <draw:text-box>
          <table:table table:name="Table63" table:style-name="Table63">
            <table:table-column table:style-name="Table63.A"/>
            <table:table-row table:style-name="Table63.1">
              <table:table-cell table:style-name="Table63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3" text:anchor-type="page" text:anchor-page-number="1" svg:x="0.3098in" svg:y="9.5in" svg:width="1.75in" svg:height="0.5in" draw:z-index="72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4" text:anchor-type="page" text:anchor-page-number="1" svg:x="2.3693in" svg:y="9.5in" svg:width="1.75in" svg:height="0.5in" draw:z-index="73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11"/>
              </table:table-cell>
            </table:table-row>
          </table:table>
          <text:p text:style-name="P5"/>
        </draw:text-box>
      </draw:frame>
      <draw:frame draw:style-name="fr1" draw:name="Frame75" text:anchor-type="page" text:anchor-page-number="1" svg:x="4.4291in" svg:y="9.5in" svg:width="1.75in" svg:height="0.5in" draw:z-index="74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10"/>
              </table:table-cell>
            </table:table-row>
          </table:table>
          <text:p text:style-name="P7"/>
        </draw:text-box>
      </draw:frame>
      <draw:frame draw:style-name="fr1" draw:name="Frame76" text:anchor-type="page" text:anchor-page-number="1" svg:x="6.489in" svg:y="9.5in" svg:width="1.75in" svg:height="0.5in" draw:z-index="75">
        <draw:text-box>
          <table:table table:name="Table62" table:style-name="Table62">
            <table:table-column table:style-name="Table62.A"/>
            <table:table-row table:style-name="Table62.1">
              <table:table-cell table:style-name="Table62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7" text:anchor-type="page" text:anchor-page-number="1" svg:x="0.3098in" svg:y="10in" svg:width="1.75in" svg:height="0.5in" draw:z-index="76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78" text:anchor-type="page" text:anchor-page-number="1" svg:x="2.3693in" svg:y="10in" svg:width="1.75in" svg:height="0.5in" draw:z-index="77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11"/>
              </table:table-cell>
            </table:table-row>
          </table:table>
          <text:p text:style-name="P5"/>
        </draw:text-box>
      </draw:frame>
      <draw:frame draw:style-name="fr1" draw:name="Frame79" text:anchor-type="page" text:anchor-page-number="1" svg:x="4.4291in" svg:y="10in" svg:width="1.75in" svg:height="0.5in" draw:z-index="78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80" text:anchor-type="page" text:anchor-page-number="1" svg:x="6.489in" svg:y="10in" svg:width="1.75in" svg:height="0.5in" draw:z-index="79">
        <draw:text-box>
          <table:table table:name="Table61" table:style-name="Table61">
            <table:table-column table:style-name="Table61.A"/>
            <table:table-row table:style-name="Table61.1">
              <table:table-cell table:style-name="Table61.A1" office:value-type="string">
                <text:p text:style-name="P6"/>
              </table:table-cell>
            </table:table-row>
          </table:table>
          <text:p text:style-name="P7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5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9:24:47.883273700</meta:creation-date>
    <dc:date>2026-05-13T00:19:46.163955800</dc:date>
    <meta:editing-duration>PT15M28S</meta:editing-duration>
    <meta:editing-cycles>5</meta:editing-cycles>
    <meta:generator>LibreOffice/25.8.6.2$Windows_X86_64 LibreOffice_project/b4b39682cd9868fa725bc664aff94278d315bd04</meta:generator>
    <meta:print-date>2026-05-13T00:11:06.935038600</meta:print-date>
    <meta:document-statistic meta:table-count="80" meta:image-count="0" meta:object-count="0" meta:page-count="1" meta:paragraph-count="3" meta:word-count="6" meta:character-count="44" meta:non-whitespace-character-count="41"/>
  </office:meta>
</office:document-meta>
</file>