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625in" fo:keep-together="always"/>
    </style:style>
    <style:style style:name="Table54.A1" style:family="table-cell">
      <style:table-cell-properties style:vertical-align="middle" fo:padding="0in" fo:border="non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625in" fo:keep-together="always"/>
    </style:style>
    <style:style style:name="Table31.A1" style:family="table-cell">
      <style:table-cell-properties style:vertical-align="middle" fo:padding="0in" fo:border="non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625in" fo:keep-together="always"/>
    </style:style>
    <style:style style:name="Table20.A1" style:family="table-cell">
      <style:table-cell-properties style:vertical-align="middle" fo:padding="0in" fo:border="non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625in" fo:keep-together="always"/>
    </style:style>
    <style:style style:name="Table19.A1" style:family="table-cell">
      <style:table-cell-properties style:vertical-align="middle" fo:padding="0in" fo:border="non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625in" fo:keep-together="always"/>
    </style:style>
    <style:style style:name="Table53.A1" style:family="table-cell">
      <style:table-cell-properties style:vertical-align="middle" fo:padding="0in" fo:border="non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625in" fo:keep-together="always"/>
    </style:style>
    <style:style style:name="Table32.A1" style:family="table-cell">
      <style:table-cell-properties style:vertical-align="middle" fo:padding="0in" fo:border="non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625in" fo:keep-together="always"/>
    </style:style>
    <style:style style:name="Table21.A1" style:family="table-cell">
      <style:table-cell-properties style:vertical-align="middle" fo:padding="0in" fo:border="non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625in" fo:keep-together="always"/>
    </style:style>
    <style:style style:name="Table18.A1" style:family="table-cell">
      <style:table-cell-properties style:vertical-align="middle" fo:padding="0in" fo:border="non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625in" fo:keep-together="always"/>
    </style:style>
    <style:style style:name="Table52.A1" style:family="table-cell">
      <style:table-cell-properties style:vertical-align="middle" fo:padding="0in" fo:border="non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625in" fo:keep-together="always"/>
    </style:style>
    <style:style style:name="Table33.A1" style:family="table-cell">
      <style:table-cell-properties style:vertical-align="middle" fo:padding="0in" fo:border="non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625in" fo:keep-together="always"/>
    </style:style>
    <style:style style:name="Table22.A1" style:family="table-cell">
      <style:table-cell-properties style:vertical-align="middle" fo:padding="0in" fo:border="non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625in" fo:keep-together="always"/>
    </style:style>
    <style:style style:name="Table17.A1" style:family="table-cell">
      <style:table-cell-properties style:vertical-align="middle" fo:padding="0in" fo:border="non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625in" fo:keep-together="always"/>
    </style:style>
    <style:style style:name="Table51.A1" style:family="table-cell">
      <style:table-cell-properties style:vertical-align="middle" fo:padding="0in" fo:border="non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625in" fo:keep-together="always"/>
    </style:style>
    <style:style style:name="Table34.A1" style:family="table-cell">
      <style:table-cell-properties style:vertical-align="middle" fo:padding="0in" fo:border="non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625in" fo:keep-together="always"/>
    </style:style>
    <style:style style:name="Table23.A1" style:family="table-cell">
      <style:table-cell-properties style:vertical-align="middle" fo:padding="0in" fo:border="non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625in" fo:keep-together="always"/>
    </style:style>
    <style:style style:name="Table16.A1" style:family="table-cell">
      <style:table-cell-properties style:vertical-align="middle" fo:padding="0in" fo:border="non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625in" fo:keep-together="always"/>
    </style:style>
    <style:style style:name="Table50.A1" style:family="table-cell">
      <style:table-cell-properties style:vertical-align="middle" fo:padding="0in" fo:border="non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625in" fo:keep-together="always"/>
    </style:style>
    <style:style style:name="Table35.A1" style:family="table-cell">
      <style:table-cell-properties style:vertical-align="middle" fo:padding="0in" fo:border="non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625in" fo:keep-together="always"/>
    </style:style>
    <style:style style:name="Table24.A1" style:family="table-cell">
      <style:table-cell-properties style:vertical-align="middle" fo:padding="0in" fo:border="non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625in" fo:keep-together="always"/>
    </style:style>
    <style:style style:name="Table15.A1" style:family="table-cell">
      <style:table-cell-properties style:vertical-align="middle" fo:padding="0in" fo:border="non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625in" fo:keep-together="always"/>
    </style:style>
    <style:style style:name="Table49.A1" style:family="table-cell">
      <style:table-cell-properties style:vertical-align="middle" fo:padding="0in" fo:border="non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625in" fo:keep-together="always"/>
    </style:style>
    <style:style style:name="Table36.A1" style:family="table-cell">
      <style:table-cell-properties style:vertical-align="middle" fo:padding="0in" fo:border="non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625in" fo:keep-together="always"/>
    </style:style>
    <style:style style:name="Table25.A1" style:family="table-cell">
      <style:table-cell-properties style:vertical-align="middle" fo:padding="0in" fo:border="non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625in" fo:keep-together="always"/>
    </style:style>
    <style:style style:name="Table14.A1" style:family="table-cell">
      <style:table-cell-properties style:vertical-align="middle" fo:padding="0in" fo:border="non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625in" fo:keep-together="always"/>
    </style:style>
    <style:style style:name="Table48.A1" style:family="table-cell">
      <style:table-cell-properties style:vertical-align="middle" fo:padding="0in" fo:border="non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625in" fo:keep-together="always"/>
    </style:style>
    <style:style style:name="Table37.A1" style:family="table-cell">
      <style:table-cell-properties style:vertical-align="middle" fo:padding="0in" fo:border="non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625in" fo:keep-together="always"/>
    </style:style>
    <style:style style:name="Table26.A1" style:family="table-cell">
      <style:table-cell-properties style:vertical-align="middle" fo:padding="0in" fo:border="non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625in" fo:keep-together="always"/>
    </style:style>
    <style:style style:name="Table13.A1" style:family="table-cell">
      <style:table-cell-properties style:vertical-align="middle" fo:padding="0in" fo:border="non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625in" fo:keep-together="always"/>
    </style:style>
    <style:style style:name="Table47.A1" style:family="table-cell">
      <style:table-cell-properties style:vertical-align="middle" fo:padding="0in" fo:border="non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625in" fo:keep-together="always"/>
    </style:style>
    <style:style style:name="Table38.A1" style:family="table-cell">
      <style:table-cell-properties style:vertical-align="middle" fo:padding="0in" fo:border="non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625in" fo:keep-together="always"/>
    </style:style>
    <style:style style:name="Table27.A1" style:family="table-cell">
      <style:table-cell-properties style:vertical-align="middle" fo:padding="0in" fo:border="non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625in" fo:keep-together="always"/>
    </style:style>
    <style:style style:name="Table12.A1" style:family="table-cell">
      <style:table-cell-properties style:vertical-align="middle" fo:padding="0in" fo:border="non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625in" fo:keep-together="always"/>
    </style:style>
    <style:style style:name="Table46.A1" style:family="table-cell">
      <style:table-cell-properties style:vertical-align="middle" fo:padding="0in" fo:border="non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625in" fo:keep-together="always"/>
    </style:style>
    <style:style style:name="Table39.A1" style:family="table-cell">
      <style:table-cell-properties style:vertical-align="middle" fo:padding="0in" fo:border="non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625in" fo:keep-together="always"/>
    </style:style>
    <style:style style:name="Table28.A1" style:family="table-cell">
      <style:table-cell-properties style:vertical-align="middle" fo:padding="0in" fo:border="non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625in" fo:keep-together="always"/>
    </style:style>
    <style:style style:name="Table11.A1" style:family="table-cell">
      <style:table-cell-properties style:vertical-align="middle" fo:padding="0in" fo:border="non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625in" fo:keep-together="always"/>
    </style:style>
    <style:style style:name="Table45.A1" style:family="table-cell">
      <style:table-cell-properties style:vertical-align="middle" fo:padding="0in" fo:border="non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625in" fo:keep-together="always"/>
    </style:style>
    <style:style style:name="Table40.A1" style:family="table-cell">
      <style:table-cell-properties style:vertical-align="middle" fo:padding="0in" fo:border="non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625in" fo:keep-together="always"/>
    </style:style>
    <style:style style:name="Table29.A1" style:family="table-cell">
      <style:table-cell-properties style:vertical-align="middle" fo:padding="0in" fo:border="non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625in" fo:keep-together="always"/>
    </style:style>
    <style:style style:name="Table10.A1" style:family="table-cell">
      <style:table-cell-properties style:vertical-align="middle" fo:padding="0in" fo:border="non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625in" fo:keep-together="always"/>
    </style:style>
    <style:style style:name="Table44.A1" style:family="table-cell">
      <style:table-cell-properties style:vertical-align="middle" fo:padding="0in" fo:border="non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625in" fo:keep-together="always"/>
    </style:style>
    <style:style style:name="Table41.A1" style:family="table-cell">
      <style:table-cell-properties style:vertical-align="middle" fo:padding="0in" fo:border="non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625in" fo:keep-together="always"/>
    </style:style>
    <style:style style:name="Table30.A1" style:family="table-cell">
      <style:table-cell-properties style:vertical-align="middle" fo:padding="0in" fo:border="non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625in" fo:keep-together="always"/>
    </style:style>
    <style:style style:name="Table9.A1" style:family="table-cell">
      <style:table-cell-properties style:vertical-align="middle" fo:padding="0in" fo:border="non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625in" fo:keep-together="always"/>
    </style:style>
    <style:style style:name="Table43.A1" style:family="table-cell">
      <style:table-cell-properties style:vertical-align="middle" fo:padding="0in" fo:border="non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625in" fo:keep-together="always"/>
    </style:style>
    <style:style style:name="Table42.A1" style:family="table-cell">
      <style:table-cell-properties style:vertical-align="middle" fo:padding="0in" fo:border="non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625in" fo:keep-together="always"/>
    </style:style>
    <style:style style:name="Table5.A1" style:family="table-cell">
      <style:table-cell-properties style:vertical-align="middle" fo:padding="0in" fo:border="non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625in" fo:keep-together="always"/>
    </style:style>
    <style:style style:name="Table6.A1" style:family="table-cell">
      <style:table-cell-properties style:vertical-align="middle" fo:padding="0in" fo:border="non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625in" fo:keep-together="always"/>
    </style:style>
    <style:style style:name="Table58.A1" style:family="table-cell">
      <style:table-cell-properties style:vertical-align="middle" fo:padding="0in" fo:border="non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625in" fo:keep-together="always"/>
    </style:style>
    <style:style style:name="Table57.A1" style:family="table-cell">
      <style:table-cell-properties style:vertical-align="middle" fo:padding="0in" fo:border="non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625in" fo:keep-together="always"/>
    </style:style>
    <style:style style:name="Table4.A1" style:family="table-cell">
      <style:table-cell-properties style:vertical-align="middle" fo:padding="0in" fo:border="non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625in" fo:keep-together="always"/>
    </style:style>
    <style:style style:name="Table7.A1" style:family="table-cell">
      <style:table-cell-properties style:vertical-align="middle" fo:padding="0in" fo:border="non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625in" fo:keep-together="always"/>
    </style:style>
    <style:style style:name="Table59.A1" style:family="table-cell">
      <style:table-cell-properties style:vertical-align="middle" fo:padding="0in" fo:border="non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625in" fo:keep-together="always"/>
    </style:style>
    <style:style style:name="Table56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625in" fo:keep-together="always"/>
    </style:style>
    <style:style style:name="Table3.A1" style:family="table-cell">
      <style:table-cell-properties style:vertical-align="middle" fo:padding="0in" fo:border="non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625in" fo:keep-together="always"/>
    </style:style>
    <style:style style:name="Table8.A1" style:family="table-cell">
      <style:table-cell-properties style:vertical-align="middle" fo:padding="0in" fo:border="non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625in" fo:keep-together="always"/>
    </style:style>
    <style:style style:name="Table60.A1" style:family="table-cell">
      <style:table-cell-properties style:vertical-align="middle" fo:padding="0in" fo:border="non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625in" fo:keep-together="always"/>
    </style:style>
    <style:style style:name="Table55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625in" fo:keep-together="always"/>
    </style:style>
    <style:style style:name="Table2.A1" style:family="table-cell">
      <style:table-cell-properties style:vertical-align="middle" fo:padding="0in" fo:border="none" style:writing-mode="page"/>
    </style:style>
    <style:style style:name="Table1" style:family="table">
      <style:table-properties style:width="1.75in" fo:break-before="page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625in" fo:keep-together="always"/>
    </style:style>
    <style:style style:name="Table1.A1" style:family="table-cell">
      <style:table-cell-properties style:vertical-align="middle" fo:padding="0in" fo:border="none" style:writing-mode="page"/>
    </style:style>
    <style:style style:name="P1" style:family="paragraph" style:parent-style-name="Standard">
      <style:text-properties style:font-name="IBM Plex Sans"/>
    </style:style>
    <style:style style:name="P2" style:family="paragraph" style:parent-style-name="Table_20_Contents">
      <style:paragraph-properties fo:text-align="center" style:justify-single-word="false"/>
      <style:text-properties fo:color="#168253" loext:opacity="100%" style:font-name="IBM Plex Sans" fo:font-size="20pt" officeooo:rsid="001b8561" officeooo:paragraph-rsid="00215f2e" style:font-size-asian="20pt" style:font-size-complex="20pt"/>
    </style:style>
    <style:style style:name="P3" style:family="paragraph" style:parent-style-name="Standard">
      <style:text-properties officeooo:paragraph-rsid="001808bf"/>
    </style:style>
    <style:style style:name="P4" style:family="paragraph" style:parent-style-name="Standard">
      <style:text-properties officeooo:paragraph-rsid="001775d3"/>
    </style:style>
    <style:style style:name="P5" style:family="paragraph" style:parent-style-name="Table_20_Contents">
      <style:paragraph-properties fo:line-height="100%" fo:text-align="center" style:justify-single-word="false"/>
      <style:text-properties fo:font-variant="small-caps" style:text-position="0% 100%" fo:font-size="12pt" fo:font-weight="normal" officeooo:rsid="0052daae" officeooo:paragraph-rsid="0029ea96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9ea96"/>
    </style:style>
    <style:style style:name="P7" style:family="paragraph" style:parent-style-name="Table_20_Contents">
      <style:paragraph-properties fo:line-height="100%" fo:text-align="center" style:justify-single-word="false"/>
      <style:text-properties fo:font-variant="small-caps" style:text-position="0% 100%" fo:font-size="12pt" fo:font-weight="normal" officeooo:rsid="0052daae" officeooo:paragraph-rsid="00290ddd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90ddd"/>
    </style:style>
    <style:style style:name="P9" style:family="paragraph" style:parent-style-name="Standard">
      <style:text-properties style:font-name="IBM Plex Sans" officeooo:rsid="0013fc98" officeooo:paragraph-rsid="001775d3"/>
    </style:style>
    <style:style style:name="P10" style:family="paragraph" style:parent-style-name="Table_20_Contents">
      <style:paragraph-properties fo:line-height="100%" fo:text-align="center" style:justify-single-word="false"/>
      <style:text-properties fo:font-variant="small-caps" style:text-position="0% 100%" fo:font-size="12pt" fo:font-weight="normal" officeooo:rsid="0052daae" officeooo:paragraph-rsid="0023d2e7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1a6999"/>
    </style:style>
    <style:style style:name="P12" style:family="paragraph" style:parent-style-name="Standard">
      <style:paragraph-properties fo:text-align="center" style:justify-single-word="false"/>
      <style:text-properties style:font-name="IBM Plex Sans" officeooo:rsid="001554c3" officeooo:paragraph-rsid="00195815"/>
    </style:style>
    <style:style style:name="T1" style:family="text">
      <style:text-properties fo:font-weight="bold" officeooo:rsid="001fd071" style:font-weight-asian="bold" style:font-weight-complex="bold"/>
    </style:style>
    <style:style style:name="T2" style:family="text">
      <style:text-properties fo:font-weight="normal" officeooo:rsid="001fd071" style:font-weight-asian="normal" style:font-weight-complex="normal"/>
    </style:style>
    <style:style style:name="T3" style:family="text">
      <style:text-properties fo:color="#999999" loext:opacity="100%" style:text-line-through-style="solid" style:text-line-through-type="single" officeooo:rsid="001fd071"/>
    </style:style>
    <style:style style:name="T4" style:family="text">
      <style:text-properties officeooo:rsid="0049f216"/>
    </style:style>
    <style:style style:name="T5" style:family="text">
      <style:text-properties officeooo:rsid="001fd071"/>
    </style:style>
    <style:style style:name="T6" style:family="text">
      <style:text-properties officeooo:rsid="00268b70"/>
    </style:style>
    <style:style style:name="T7" style:family="text">
      <style:text-properties officeooo:rsid="0023d2e7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0" text:anchor-type="page" text:anchor-page-number="1" svg:x="6.489in" svg:y="9.8917in" svg:width="1.75in" svg:height="0.6701in" draw:z-index="59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59" text:anchor-type="page" text:anchor-page-number="1" svg:x="4.4291in" svg:y="9.8917in" svg:width="1.75in" svg:height="0.6701in" draw:z-index="58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58" text:anchor-type="page" text:anchor-page-number="1" svg:x="2.3693in" svg:y="9.8917in" svg:width="1.75in" svg:height="0.6701in" draw:z-index="57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2"><text:span text:style-name="T2"/></text:p>
              </table:table-cell>
            </table:table-row>
          </table:table>
          <text:p text:style-name="P4"/>
        </draw:text-box>
      </draw:frame>
      <draw:frame draw:style-name="fr1" draw:name="Frame57" text:anchor-type="page" text:anchor-page-number="1" svg:x="0.3098in" svg:y="9.8917in" svg:width="1.75in" svg:height="0.6701in" draw:z-index="56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5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6"/>
        </draw:text-box>
      </draw:frame>
      <draw:frame draw:style-name="fr1" draw:name="Frame56" text:anchor-type="page" text:anchor-page-number="1" svg:x="6.489in" svg:y="9.2217in" svg:width="1.75in" svg:height="0.6701in" draw:z-index="55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55" text:anchor-type="page" text:anchor-page-number="1" svg:x="4.4291in" svg:y="9.2217in" svg:width="1.75in" svg:height="0.6701in" draw:z-index="54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54" text:anchor-type="page" text:anchor-page-number="1" svg:x="2.3693in" svg:y="9.2217in" svg:width="1.75in" svg:height="0.6701in" draw:z-index="53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2"><text:span text:style-name="T2"/></text:p>
              </table:table-cell>
            </table:table-row>
          </table:table>
          <text:p text:style-name="P4"/>
        </draw:text-box>
      </draw:frame>
      <draw:frame draw:style-name="fr1" draw:name="Frame53" text:anchor-type="page" text:anchor-page-number="1" svg:x="0.3098in" svg:y="9.2217in" svg:width="1.75in" svg:height="0.6701in" draw:z-index="52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5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6"/>
        </draw:text-box>
      </draw:frame>
      <draw:frame draw:style-name="fr1" draw:name="Frame52" text:anchor-type="page" text:anchor-page-number="1" svg:x="6.489in" svg:y="8.5516in" svg:width="1.75in" svg:height="0.6701in" draw:z-index="51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51" text:anchor-type="page" text:anchor-page-number="1" svg:x="4.4291in" svg:y="8.5516in" svg:width="1.75in" svg:height="0.6701in" draw:z-index="50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50" text:anchor-type="page" text:anchor-page-number="1" svg:x="2.3693in" svg:y="8.5516in" svg:width="1.75in" svg:height="0.6701in" draw:z-index="49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2"><text:span text:style-name="T1"/></text:p>
              </table:table-cell>
            </table:table-row>
          </table:table>
          <text:p text:style-name="P4"/>
        </draw:text-box>
      </draw:frame>
      <draw:frame draw:style-name="fr1" draw:name="Frame49" text:anchor-type="page" text:anchor-page-number="1" svg:x="0.3098in" svg:y="8.5516in" svg:width="1.75in" svg:height="0.6701in" draw:z-index="48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5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6"/>
        </draw:text-box>
      </draw:frame>
      <draw:frame draw:style-name="fr1" draw:name="Frame48" text:anchor-type="page" text:anchor-page-number="1" svg:x="6.489in" svg:y="7.8811in" svg:width="1.75in" svg:height="0.6701in" draw:z-index="47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47" text:anchor-type="page" text:anchor-page-number="1" svg:x="4.4291in" svg:y="7.8811in" svg:width="1.75in" svg:height="0.6701in" draw:z-index="46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46" text:anchor-type="page" text:anchor-page-number="1" svg:x="2.3693in" svg:y="7.8811in" svg:width="1.75in" svg:height="0.6701in" draw:z-index="45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2"><text:span text:style-name="T2"/></text:p>
              </table:table-cell>
            </table:table-row>
          </table:table>
          <text:p text:style-name="P4"/>
        </draw:text-box>
      </draw:frame>
      <draw:frame draw:style-name="fr1" draw:name="Frame45" text:anchor-type="page" text:anchor-page-number="1" svg:x="0.3098in" svg:y="7.8811in" svg:width="1.75in" svg:height="0.6701in" draw:z-index="44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5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6"/>
        </draw:text-box>
      </draw:frame>
      <draw:frame draw:style-name="fr1" draw:name="Frame44" text:anchor-type="page" text:anchor-page-number="1" svg:x="6.489in" svg:y="7.211in" svg:width="1.75in" svg:height="0.6701in" draw:z-index="43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43" text:anchor-type="page" text:anchor-page-number="1" svg:x="4.4291in" svg:y="7.211in" svg:width="1.75in" svg:height="0.6701in" draw:z-index="42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42" text:anchor-type="page" text:anchor-page-number="1" svg:x="2.3693in" svg:y="7.211in" svg:width="1.75in" svg:height="0.6701in" draw:z-index="41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2"><text:span text:style-name="T1"/></text:p>
              </table:table-cell>
            </table:table-row>
          </table:table>
          <text:p text:style-name="P4"/>
        </draw:text-box>
      </draw:frame>
      <draw:frame draw:style-name="fr1" draw:name="Frame41" text:anchor-type="page" text:anchor-page-number="1" svg:x="0.3098in" svg:y="7.211in" svg:width="1.75in" svg:height="0.6701in" draw:z-index="40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5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6"/>
        </draw:text-box>
      </draw:frame>
      <draw:frame draw:style-name="fr1" draw:name="Frame40" text:anchor-type="page" text:anchor-page-number="1" svg:x="6.489in" svg:y="6.5409in" svg:width="1.75in" svg:height="0.6701in" draw:z-index="39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39" text:anchor-type="page" text:anchor-page-number="1" svg:x="4.4291in" svg:y="6.5409in" svg:width="1.75in" svg:height="0.6701in" draw:z-index="38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38" text:anchor-type="page" text:anchor-page-number="1" svg:x="2.3693in" svg:y="6.5409in" svg:width="1.75in" svg:height="0.6701in" draw:z-index="3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2"><text:span text:style-name="T2"/></text:p>
              </table:table-cell>
            </table:table-row>
          </table:table>
          <text:p text:style-name="P4"/>
        </draw:text-box>
      </draw:frame>
      <draw:frame draw:style-name="fr1" draw:name="Frame37" text:anchor-type="page" text:anchor-page-number="1" svg:x="0.3098in" svg:y="6.5409in" svg:width="1.75in" svg:height="0.6701in" draw:z-index="36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7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4"/>
        </draw:text-box>
      </draw:frame>
      <draw:frame draw:style-name="fr1" draw:name="Frame36" text:anchor-type="page" text:anchor-page-number="1" svg:x="6.489in" svg:y="5.8709in" svg:width="1.75in" svg:height="0.6701in" draw:z-index="35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35" text:anchor-type="page" text:anchor-page-number="1" svg:x="4.4291in" svg:y="5.8709in" svg:width="1.75in" svg:height="0.6701in" draw:z-index="34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34" text:anchor-type="page" text:anchor-page-number="1" svg:x="2.3693in" svg:y="5.8709in" svg:width="1.75in" svg:height="0.6701in" draw:z-index="33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2"><text:span text:style-name="T1"/></text:p>
              </table:table-cell>
            </table:table-row>
          </table:table>
          <text:p text:style-name="P4"/>
        </draw:text-box>
      </draw:frame>
      <draw:frame draw:style-name="fr1" draw:name="Frame33" text:anchor-type="page" text:anchor-page-number="1" svg:x="0.3098in" svg:y="5.8709in" svg:width="1.75in" svg:height="0.6701in" draw:z-index="32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7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8"/>
        </draw:text-box>
      </draw:frame>
      <draw:frame draw:style-name="fr1" draw:name="Frame32" text:anchor-type="page" text:anchor-page-number="1" svg:x="6.489in" svg:y="5.2008in" svg:width="1.75in" svg:height="0.6701in" draw:z-index="31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31" text:anchor-type="page" text:anchor-page-number="1" svg:x="4.4291in" svg:y="5.2008in" svg:width="1.75in" svg:height="0.6701in" draw:z-index="30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30" text:anchor-type="page" text:anchor-page-number="1" svg:x="2.3693in" svg:y="5.2008in" svg:width="1.75in" svg:height="0.6701in" draw:z-index="29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2"><text:span text:style-name="T2"/></text:p>
              </table:table-cell>
            </table:table-row>
          </table:table>
          <text:p text:style-name="P4"/>
        </draw:text-box>
      </draw:frame>
      <draw:frame draw:style-name="fr1" draw:name="Frame29" text:anchor-type="page" text:anchor-page-number="1" svg:x="0.3098in" svg:y="5.2008in" svg:width="1.75in" svg:height="0.6701in" draw:z-index="28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7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8"/>
        </draw:text-box>
      </draw:frame>
      <draw:frame draw:style-name="fr1" draw:name="Frame28" text:anchor-type="page" text:anchor-page-number="1" svg:x="6.489in" svg:y="4.5307in" svg:width="1.75in" svg:height="0.6701in" draw:z-index="27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27" text:anchor-type="page" text:anchor-page-number="1" svg:x="4.4291in" svg:y="4.5307in" svg:width="1.75in" svg:height="0.6701in" draw:z-index="26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26" text:anchor-type="page" text:anchor-page-number="1" svg:x="2.3693in" svg:y="4.5307in" svg:width="1.75in" svg:height="0.6701in" draw:z-index="25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2"><text:span text:style-name="T1"/></text:p>
              </table:table-cell>
            </table:table-row>
          </table:table>
          <text:p text:style-name="P4"/>
        </draw:text-box>
      </draw:frame>
      <draw:frame draw:style-name="fr1" draw:name="Frame25" text:anchor-type="page" text:anchor-page-number="1" svg:x="0.3098in" svg:y="4.5307in" svg:width="1.75in" svg:height="0.6701in" draw:z-index="24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7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8"/>
        </draw:text-box>
      </draw:frame>
      <draw:frame draw:style-name="fr1" draw:name="Frame24" text:anchor-type="page" text:anchor-page-number="1" svg:x="6.489in" svg:y="3.8602in" svg:width="1.75in" svg:height="0.6701in" draw:z-index="23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23" text:anchor-type="page" text:anchor-page-number="1" svg:x="4.4291in" svg:y="3.8602in" svg:width="1.75in" svg:height="0.6701in" draw:z-index="22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22" text:anchor-type="page" text:anchor-page-number="1" svg:x="2.3693in" svg:y="3.8602in" svg:width="1.75in" svg:height="0.6701in" draw:z-index="21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2"><text:span text:style-name="T2"/></text:p>
              </table:table-cell>
            </table:table-row>
          </table:table>
          <text:p text:style-name="P4"/>
        </draw:text-box>
      </draw:frame>
      <draw:frame draw:style-name="fr1" draw:name="Frame21" text:anchor-type="page" text:anchor-page-number="1" svg:x="0.3098in" svg:y="3.8602in" svg:width="1.75in" svg:height="0.6701in" draw:z-index="20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7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8"/>
        </draw:text-box>
      </draw:frame>
      <draw:frame draw:style-name="fr1" draw:name="Frame20" text:anchor-type="page" text:anchor-page-number="1" svg:x="6.489in" svg:y="3.1902in" svg:width="1.75in" svg:height="0.6701in" draw:z-index="19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19" text:anchor-type="page" text:anchor-page-number="1" svg:x="4.4291in" svg:y="3.1902in" svg:width="1.75in" svg:height="0.6701in" draw:z-index="18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18" text:anchor-type="page" text:anchor-page-number="1" svg:x="2.3693in" svg:y="3.1902in" svg:width="1.75in" svg:height="0.6701in" draw:z-index="1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2"><text:span text:style-name="T1"/></text:p>
              </table:table-cell>
            </table:table-row>
          </table:table>
          <text:p text:style-name="P4"/>
        </draw:text-box>
      </draw:frame>
      <draw:frame draw:style-name="fr1" draw:name="Frame17" text:anchor-type="page" text:anchor-page-number="1" svg:x="0.3098in" svg:y="3.1902in" svg:width="1.75in" svg:height="0.6701in" draw:z-index="16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7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8"/>
        </draw:text-box>
      </draw:frame>
      <draw:frame draw:style-name="fr1" draw:name="Frame16" text:anchor-type="page" text:anchor-page-number="1" svg:x="6.489in" svg:y="2.5201in" svg:width="1.75in" svg:height="0.6701in" draw:z-index="15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15" text:anchor-type="page" text:anchor-page-number="1" svg:x="4.4291in" svg:y="2.5201in" svg:width="1.75in" svg:height="0.6701in" draw:z-index="14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14" text:anchor-type="page" text:anchor-page-number="1" svg:x="2.3693in" svg:y="2.5201in" svg:width="1.75in" svg:height="0.6701in" draw:z-index="13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2"><text:span text:style-name="T2"/></text:p>
              </table:table-cell>
            </table:table-row>
          </table:table>
          <text:p text:style-name="P4"/>
        </draw:text-box>
      </draw:frame>
      <draw:frame draw:style-name="fr1" draw:name="Frame13" text:anchor-type="page" text:anchor-page-number="1" svg:x="0.3098in" svg:y="2.5201in" svg:width="1.75in" svg:height="0.6701in" draw:z-index="12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7"><text:span text:style-name="T3">Salmon</text:span><text:span text:style-name="T4"> → </text:span><text:span text:style-name="T1">Tuna</text:span><text:span text:style-name="T5"><text:line-break/> <text:s text:c="7"/></text:span><text:span text:style-name="T6"><text:s text:c="6"/></text:span><text:span text:style-name="T7">+$1.00</text:span></text:p>
              </table:table-cell>
            </table:table-row>
          </table:table>
          <text:p text:style-name="P9"/>
        </draw:text-box>
      </draw:frame>
      <draw:frame draw:style-name="fr1" draw:name="Frame12" text:anchor-type="page" text:anchor-page-number="1" svg:x="6.489in" svg:y="1.85in" svg:width="1.75in" svg:height="0.6701in" draw:z-index="11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11" text:anchor-type="page" text:anchor-page-number="1" svg:x="4.4291in" svg:y="1.85in" svg:width="1.75in" svg:height="0.6701in" draw:z-index="10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10" text:anchor-type="page" text:anchor-page-number="1" svg:x="2.3693in" svg:y="1.85in" svg:width="1.75in" svg:height="0.6701in" draw:z-index="9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2"><text:span text:style-name="T1"/></text:p>
              </table:table-cell>
            </table:table-row>
          </table:table>
          <text:p text:style-name="P4"/>
        </draw:text-box>
      </draw:frame>
      <draw:frame draw:style-name="fr1" draw:name="Frame9" text:anchor-type="page" text:anchor-page-number="1" svg:x="0.3098in" svg:y="1.85in" svg:width="1.75in" svg:height="0.6701in" draw:z-index="8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10"/>
              </table:table-cell>
            </table:table-row>
          </table:table>
          <text:p text:style-name="P9"/>
        </draw:text-box>
      </draw:frame>
      <draw:frame draw:style-name="fr1" draw:name="Frame8" text:anchor-type="page" text:anchor-page-number="1" svg:x="6.489in" svg:y="1.1799in" svg:width="1.75in" svg:height="0.6701in" draw:z-index="7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7" text:anchor-type="page" text:anchor-page-number="1" svg:x="4.4291in" svg:y="1.1799in" svg:width="1.75in" svg:height="0.6701in" draw:z-index="6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6" text:anchor-type="page" text:anchor-page-number="1" svg:x="2.3693in" svg:y="1.1799in" svg:width="1.75in" svg:height="0.6701in" draw:z-index="5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2"><text:span text:style-name="T1"/></text:p>
              </table:table-cell>
            </table:table-row>
          </table:table>
          <text:p text:style-name="Standard"/>
        </draw:text-box>
      </draw:frame>
      <draw:frame draw:style-name="fr1" draw:name="Frame5" text:anchor-type="page" text:anchor-page-number="1" svg:x="0.3098in" svg:y="1.1799in" svg:width="1.75in" svg:height="0.6701in" draw:z-index="4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10"/>
              </table:table-cell>
            </table:table-row>
          </table:table>
          <text:p text:style-name="P9"/>
        </draw:text-box>
      </draw:frame>
      <draw:frame draw:style-name="fr1" draw:name="Frame4" text:anchor-type="page" text:anchor-page-number="1" svg:x="6.489in" svg:y="0.5098in" svg:width="1.75in" svg:height="0.6701in" draw:z-index="3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2"><text:span text:style-name="T2"/></text:p>
              </table:table-cell>
            </table:table-row>
          </table:table>
          <text:p text:style-name="P3"/>
        </draw:text-box>
      </draw:frame>
      <draw:frame draw:style-name="fr1" draw:name="Frame3" text:anchor-type="page" text:anchor-page-number="1" svg:x="4.4291in" svg:y="0.5098in" svg:width="1.75in" svg:height="0.6701in" draw:z-index="2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2"><text:span text:style-name="T1"/></text:p>
              </table:table-cell>
            </table:table-row>
          </table:table>
          <text:p text:style-name="P3"/>
        </draw:text-box>
      </draw:frame>
      <draw:frame draw:style-name="fr1" draw:name="Frame2" text:anchor-type="page" text:anchor-page-number="1" svg:x="2.3693in" svg:y="0.5098in" svg:width="1.75in" svg:height="0.6701in" draw:z-index="1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2"><text:span text:style-name="T2"/></text:p>
              </table:table-cell>
            </table:table-row>
          </table:table>
          <text:p text:style-name="P11"/>
        </draw:text-box>
      </draw:frame>
      <draw:frame draw:style-name="fr1" draw:name="Frame1" text:anchor-type="page" text:anchor-page-number="1" svg:x="0.3098in" svg:y="0.5098in" svg:width="1.75in" svg:height="0.6701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0"/>
              </table:table-cell>
            </table:table-row>
          </table:table>
          <text:p text:style-name="P12"/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6701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098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09:35:56.759695500</meta:creation-date>
    <dc:date>2026-05-26T12:50:48.045174900</dc:date>
    <meta:editing-duration>PT1H18M52S</meta:editing-duration>
    <meta:editing-cycles>11</meta:editing-cycles>
    <meta:generator>LibreOffice/25.8.6.2$Windows_X86_64 LibreOffice_project/b4b39682cd9868fa725bc664aff94278d315bd04</meta:generator>
    <meta:print-date>2026-05-13T00:24:54.538542200</meta:print-date>
    <meta:document-statistic meta:table-count="60" meta:image-count="0" meta:object-count="0" meta:page-count="1" meta:paragraph-count="12" meta:word-count="48" meta:character-count="408" meta:non-whitespace-character-count="204"/>
  </office:meta>
</office:document-meta>
</file>