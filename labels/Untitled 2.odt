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90000038948B9671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le4" style:family="table">
      <style:table-properties style:width="3.9972in" table:align="left"/>
    </style:style>
    <style:style style:name="Table4.A" style:family="table-column">
      <style:table-column-properties style:column-width="2.5653in"/>
    </style:style>
    <style:style style:name="Table4.B" style:family="table-column">
      <style:table-column-properties style:column-width="1.4319in"/>
    </style:style>
    <style:style style:name="Table4.1" style:family="table-row">
      <style:table-row-properties style:min-row-height="1.9986in"/>
    </style:style>
    <style:style style:name="Table4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3.9972in" table:align="left"/>
    </style:style>
    <style:style style:name="Table3.A" style:family="table-column">
      <style:table-column-properties style:column-width="2.5653in"/>
    </style:style>
    <style:style style:name="Table3.B" style:family="table-column">
      <style:table-column-properties style:column-width="1.4319in"/>
    </style:style>
    <style:style style:name="Table3.1" style:family="table-row">
      <style:table-row-properties style:min-row-height="1.9986in"/>
    </style:style>
    <style:style style:name="Table3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3.9972in" table:align="left"/>
    </style:style>
    <style:style style:name="Table2.A" style:family="table-column">
      <style:table-column-properties style:column-width="2.5653in"/>
    </style:style>
    <style:style style:name="Table2.B" style:family="table-column">
      <style:table-column-properties style:column-width="1.4319in"/>
    </style:style>
    <style:style style:name="Table2.1" style:family="table-row">
      <style:table-row-properties style:min-row-height="1.9986in"/>
    </style:style>
    <style:style style:name="Table2.A1" style:family="table-cell">
      <style:table-cell-properties style:vertical-align="middle" fo:padding="0in" fo:border="none" style:writing-mode="page"/>
    </style:style>
    <style:style style:name="Table1" style:family="table">
      <style:table-properties style:width="3.9972in" table:align="left"/>
    </style:style>
    <style:style style:name="Table1.A" style:family="table-column">
      <style:table-column-properties style:column-width="2.5653in"/>
    </style:style>
    <style:style style:name="Table1.B" style:family="table-column">
      <style:table-column-properties style:column-width="1.4319in"/>
    </style:style>
    <style:style style:name="Table1.1" style:family="table-row">
      <style:table-row-properties style:min-row-height="1.9986in"/>
    </style:style>
    <style:style style:name="Table1.A1" style:family="table-cell">
      <style:table-cell-properties style:vertical-align="middle" fo:padding="0in" fo:border="none" style:writing-mode="page"/>
    </style:style>
    <style:style style:name="P1" style:family="paragraph" style:parent-style-name="Table_20_Contents">
      <style:text-properties style:font-name="Segoe UI" fo:font-size="24pt" fo:font-weight="bold" officeooo:rsid="0016c70d" officeooo:paragraph-rsid="00175f0c" style:font-size-asian="24pt" style:font-weight-asian="bold" style:font-size-complex="24pt" style:font-weight-complex="bold"/>
    </style:style>
    <style:style style:name="P2" style:family="paragraph" style:parent-style-name="Table_20_Contents">
      <style:text-properties officeooo:paragraph-rsid="00175f0c"/>
    </style:style>
    <style:style style:name="P3" style:family="paragraph" style:parent-style-name="Standard">
      <style:text-properties officeooo:paragraph-rsid="00175f0c"/>
    </style:style>
    <style:style style:name="T1" style:family="text">
      <style:text-properties fo:font-size="16pt" fo:font-weight="normal" officeooo:rsid="00175f0c" style:font-size-asian="16pt" style:font-weight-asian="normal" style:font-size-complex="16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0" text:anchor-type="page" text:anchor-page-number="1" svg:x="4.3437in" svg:y="8.5in" svg:width="4in" svg:height="2in" draw:z-index="9">
        <draw:text-box>
          <text:p text:style-name="Standard"/>
        </draw:text-box>
      </draw:frame>
      <draw:frame draw:style-name="fr1" draw:name="Frame9" text:anchor-type="page" text:anchor-page-number="1" svg:x="0.1563in" svg:y="8.5in" svg:width="4in" svg:height="2in" draw:z-index="8">
        <draw:text-box>
          <text:p text:style-name="Standard"/>
        </draw:text-box>
      </draw:frame>
      <draw:frame draw:style-name="fr1" draw:name="Frame8" text:anchor-type="page" text:anchor-page-number="1" svg:x="4.3437in" svg:y="6.5in" svg:width="4in" svg:height="2in" draw:z-index="7">
        <draw:text-box>
          <text:p text:style-name="Standard"/>
        </draw:text-box>
      </draw:frame>
      <draw:frame draw:style-name="fr1" draw:name="Frame7" text:anchor-type="page" text:anchor-page-number="1" svg:x="0.1563in" svg:y="6.5in" svg:width="4in" svg:height="2in" draw:z-index="6">
        <draw:text-box>
          <text:p text:style-name="Standard"/>
        </draw:text-box>
      </draw:frame>
      <draw:frame draw:style-name="fr1" draw:name="Frame6" text:anchor-type="page" text:anchor-page-number="1" svg:x="4.3437in" svg:y="4.5in" svg:width="4in" svg:height="2in" draw:z-index="5">
        <draw:text-box>
          <text:p text:style-name="Standard"/>
        </draw:text-box>
      </draw:frame>
      <draw:frame draw:style-name="fr1" draw:name="Frame5" text:anchor-type="page" text:anchor-page-number="1" svg:x="0.1563in" svg:y="4.5in" svg:width="4in" svg:height="2in" draw:z-index="4">
        <draw:text-box>
          <text:p text:style-name="Standard"/>
        </draw:text-box>
      </draw:frame>
      <draw:frame draw:style-name="fr1" draw:name="Frame4" text:anchor-type="page" text:anchor-page-number="1" svg:x="4.3437in" svg:y="2.5in" svg:width="4in" svg:height="2in" draw:z-index="3">
        <draw:text-box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office:value-type="string">
                <text:p text:style-name="P1">Cherry Blossom<text:line-break/><text:span text:style-name="T1">Ingredients:<text:line-break/>crab stick, light cream cheese, sushi rice, lettuce, tempura, green onion, spicy mayo, rice paper.</text:span></text:p>
              </table:table-cell>
              <table:table-cell table:style-name="Table4.A1" office:value-type="string">
                <text:p text:style-name="P2"><draw:frame draw:style-name="fr2" draw:name="Image1 Copy 3" text:anchor-type="as-char" svg:y="-0.4492in" svg:width="1.4319in" svg:height="1.4319in" draw:z-index="10"><draw:image xlink:href="Pictures/10000000000003890000038948B96719.png" xlink:type="simple" xlink:show="embed" xlink:actuate="onLoad" draw:mime-type="image/png"/></draw:frame></text:p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0.1563in" svg:y="2.5in" svg:width="4in" svg:height="2in" draw:z-index="2">
        <draw:text-box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office:value-type="string">
                <text:p text:style-name="P1">Cherry Blossom<text:line-break/><text:span text:style-name="T1">Ingredients:<text:line-break/>crab stick, light cream cheese, sushi rice, lettuce, tempura, green onion, spicy mayo, rice paper.</text:span></text:p>
              </table:table-cell>
              <table:table-cell table:style-name="Table3.A1" office:value-type="string">
                <text:p text:style-name="P2"><draw:frame draw:style-name="fr2" draw:name="Image1 Copy 3 Copy 1" text:anchor-type="as-char" svg:y="-0.4492in" svg:width="1.4319in" svg:height="1.4319in" draw:z-index="11"><draw:image xlink:href="Pictures/10000000000003890000038948B96719.png" xlink:type="simple" xlink:show="embed" xlink:actuate="onLoad" draw:mime-type="image/png"/></draw:frame></text:p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4.3437in" svg:y="0.5in" svg:width="4in" svg:height="2in" draw:z-index="1">
        <draw:text-box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p text:style-name="P1">Cherry Blossom<text:line-break/><text:span text:style-name="T1">Ingredients:<text:line-break/>crab stick, light cream cheese, sushi rice, lettuce, tempura, green onion, spicy mayo, rice paper.</text:span></text:p>
              </table:table-cell>
              <table:table-cell table:style-name="Table2.A1" office:value-type="string">
                <text:p text:style-name="P2"><draw:frame draw:style-name="fr2" draw:name="Image1 Copy 3 Copy 3" text:anchor-type="as-char" svg:y="-0.4492in" svg:width="1.4319in" svg:height="1.4319in" draw:z-index="13"><draw:image xlink:href="Pictures/10000000000003890000038948B96719.png" xlink:type="simple" xlink:show="embed" xlink:actuate="onLoad" draw:mime-type="image/png"/></draw:frame></text:p>
              </table:table-cell>
            </table:table-row>
          </table:table>
          <text:p text:style-name="P3"/>
        </draw:text-box>
      </draw:frame>
      <draw:frame draw:style-name="fr1" draw:name="Frame1" text:anchor-type="page" text:anchor-page-number="1" svg:x="0.1563in" svg:y="0.5in" svg:width="4in" svg:height="2in" draw:z-index="0">
        <draw:text-box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">Cherry Blossom<text:line-break/><text:span text:style-name="T1">Ingredients:<text:line-break/>crab stick, light cream cheese, sushi rice, lettuce, tempura, green onion, spicy mayo, rice paper.</text:span></text:p>
              </table:table-cell>
              <table:table-cell table:style-name="Table1.A1" office:value-type="string">
                <text:p text:style-name="P2"><draw:frame draw:style-name="fr2" draw:name="Image1 Copy 3 Copy 2" text:anchor-type="as-char" svg:y="-0.4492in" svg:width="1.4319in" svg:height="1.4319in" draw:z-index="12"><draw:image xlink:href="Pictures/10000000000003890000038948B96719.png" xlink:type="simple" xlink:show="embed" xlink:actuate="onLoad" draw:mime-type="image/png"/></draw:frame></text:p>
              </table:table-cell>
            </table:table-row>
          </table:table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1563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09:38:00.221211300</meta:creation-date>
    <meta:print-date>2026-05-09T09:44:39.819526200</meta:print-date>
    <dc:date>2026-05-09T11:46:14.602067900</dc:date>
    <meta:editing-duration>PT2H1M55S</meta:editing-duration>
    <meta:editing-cycles>1</meta:editing-cycles>
    <meta:document-statistic meta:table-count="4" meta:image-count="4" meta:object-count="0" meta:page-count="1" meta:paragraph-count="8" meta:word-count="72" meta:character-count="504" meta:non-whitespace-character-count="436"/>
    <meta:generator>LibreOffice/25.8.5.2$Windows_X86_64 LibreOffice_project/9c8b85f387cc00a89945a79c9e6239f32e450ac2</meta:generator>
  </office:meta>
</office:document-meta>
</file>